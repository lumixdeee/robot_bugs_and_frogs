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50000011270E2B924.png" manifest:media-type="image/png"/>
  <manifest:file-entry manifest:full-path="Pictures/100000000000022E0000014B2FFEF04C.png" manifest:media-type="image/png"/>
  <manifest:file-entry manifest:full-path="Pictures/100000000000020A00000161FA2BCF4F.png" manifest:media-type="image/png"/>
  <manifest:file-entry manifest:full-path="Pictures/1000000000000231000001365363C4B3.png" manifest:media-type="image/png"/>
  <manifest:file-entry manifest:full-path="Pictures/10000000000001AF000000FD61730A50.png" manifest:media-type="image/png"/>
  <manifest:file-entry manifest:full-path="Pictures/100000000000021500000122D9A5D494.png" manifest:media-type="image/png"/>
  <manifest:file-entry manifest:full-path="Pictures/100000000000020200000132AAD010C5.png" manifest:media-type="image/png"/>
  <manifest:file-entry manifest:full-path="Pictures/1000000000000217000001415B58B036.png" manifest:media-type="image/png"/>
  <manifest:file-entry manifest:full-path="Pictures/10000000000002260000016846FBAC5E.png" manifest:media-type="image/png"/>
  <manifest:file-entry manifest:full-path="Pictures/10000000000002560000013F326A2D89.png" manifest:media-type="image/png"/>
  <manifest:file-entry manifest:full-path="Pictures/100000000000021900000121115A13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dd31"/>
    </style:style>
    <style:style style:name="P2" style:family="paragraph" style:parent-style-name="Standard">
      <style:paragraph-properties fo:break-before="page"/>
      <style:text-properties officeooo:paragraph-rsid="0013dd31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e got our list of 11 bots and out list of 12 actors</text:p>
      <text:p text:style-name="P1">Match the bots to the actors and find the missing actor so we can make bot 12<text:line-break/>"Important: the bot list is shown in the embedded screenshots. Read the screenshots/cards before answering. Do not answer from parsed text alone."<text:line-break/><draw:frame draw:style-name="fr1" draw:name="Image5" text:anchor-type="char" svg:x="0.965cm" svg:y="18.491cm" svg:width="14.208cm" svg:height="7.646cm" draw:z-index="4"><draw:image xlink:href="Pictures/100000000000021900000121115A13F3.png" xlink:type="simple" xlink:show="embed" xlink:actuate="onLoad" draw:mime-type="image/png"/></draw:frame><draw:frame draw:style-name="fr1" draw:name="Image1" text:anchor-type="char" svg:x="-0.808cm" svg:y="5.685cm" svg:width="15.822cm" svg:height="8.44cm" draw:z-index="0"><draw:image xlink:href="Pictures/10000000000002560000013F326A2D89.png" xlink:type="simple" xlink:show="embed" xlink:actuate="onLoad" draw:mime-type="image/png"/></draw:frame></text:p>
      <text:p text:style-name="P2"><draw:frame draw:style-name="fr1" draw:name="Image4" text:anchor-type="char" svg:x="1.453cm" svg:y="0.189cm" svg:width="13.6cm" svg:height="8.096cm" draw:z-index="3"><draw:image xlink:href="Pictures/100000000000020200000132AAD010C5.png" xlink:type="simple" xlink:show="embed" xlink:actuate="onLoad" draw:mime-type="image/png"/></draw:frame></text:p>
      <text:p text:style-name="Standard"/>
      <text:p text:style-name="Standard"><text:line-break/><text:line-break/><text:line-break/><draw:frame draw:style-name="fr1" draw:name="Image3" text:anchor-type="char" svg:x="0.806cm" svg:y="0.005cm" svg:width="14.896cm" svg:height="7.488cm" draw:z-index="2"><draw:image xlink:href="Pictures/100000000000021500000122D9A5D494.png" xlink:type="simple" xlink:show="embed" xlink:actuate="onLoad" draw:mime-type="image/png"/></draw:frame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0.055cm" svg:y="0.392cm" svg:width="14.923cm" svg:height="7.911cm" draw:z-index="8"><draw:image xlink:href="Pictures/10000000000001AF000000FD61730A50.png" xlink:type="simple" xlink:show="embed" xlink:actuate="onLoad" draw:mime-type="image/png"/></draw:frame></text:p>
      <text:p text:style-name="Standard"/>
      <text:p text:style-name="Standard"><draw:frame draw:style-name="fr1" draw:name="Image11" text:anchor-type="char" svg:x="0.531cm" svg:y="-1.224cm" svg:width="14.843cm" svg:height="8.202cm" draw:z-index="7"><draw:image xlink:href="Pictures/1000000000000231000001365363C4B3.png" xlink:type="simple" xlink:show="embed" xlink:actuate="onLoad" draw:mime-type="image/png"/></draw:frame><text:soft-page-break/></text:p>
      <text:p text:style-name="Standard"><draw:frame draw:style-name="fr1" draw:name="Image8" text:anchor-type="char" svg:x="0.213cm" svg:y="0.351cm" svg:width="14.764cm" svg:height="8.758cm" draw:z-index="5"><draw:image xlink:href="Pictures/100000000000022E0000014B2FFEF04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1.08cm" svg:y="17.05cm" svg:width="14.552cm" svg:height="9.525cm" draw:z-index="1"><draw:image xlink:href="Pictures/10000000000002260000016846FBAC5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1.418cm" svg:y="-1.344cm" svg:width="13.811cm" svg:height="9.34cm" draw:z-index="6"><draw:image xlink:href="Pictures/100000000000020A00000161FA2BCF4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6" text:anchor-type="char" svg:x="1.344cm" svg:y="3.575cm" svg:width="14.102cm" svg:height="7.25cm" draw:z-index="10"><draw:image xlink:href="Pictures/10000000000002150000011270E2B92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x="0.233cm" svg:y="0.286cm" svg:width="14.155cm" svg:height="8.493cm" draw:z-index="9"><draw:image xlink:href="Pictures/1000000000000217000001415B58B036.png" xlink:type="simple" xlink:show="embed" xlink:actuate="onLoad" draw:mime-type="image/png"/></draw:frame></text:p>
      <text:p text:style-name="P3"/>
      <text:p text:style-name="Standard"/>
      <text:p text:style-name="Standard">12 ACTORS:</text:p>
      <text:p text:style-name="Standard">King <text:s/></text:p>
      <text:p text:style-name="Standard">Queen <text:s/></text:p>
      <text:p text:style-name="Standard">Prince <text:s/></text:p>
      <text:p text:style-name="Standard">Loki (prince 2, fox, trickster) <text:s/></text:p>
      <text:p text:style-name="Standard">Steed <text:s/></text:p>
      <text:p text:style-name="Standard">Healer</text:p>
      <text:p text:style-name="Standard">Soldier <text:s/></text:p>
      <text:p text:style-name="Standard">Merchant <text:s/></text:p>
      <text:p text:style-name="Standard">Teacher</text:p>
      <text:p text:style-name="Standard">Dragon</text:p>
      <text:p text:style-name="Standard">Princess <text:s/></text:p>
      <text:p text:style-name="Standard">The Witch not invited by Loki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5T19:30:55.332843996</meta:creation-date>
    <dc:date>2026-06-05T21:24:17.673663071</dc:date>
    <meta:editing-duration>PT9M6S</meta:editing-duration>
    <meta:editing-cycles>3</meta:editing-cycles>
    <meta:generator>LibreOffice/25.2.3.2$Linux_X86_64 LibreOffice_project/520$Build-2</meta:generator>
    <meta:document-statistic meta:table-count="0" meta:image-count="11" meta:object-count="0" meta:page-count="6" meta:paragraph-count="16" meta:word-count="75" meta:character-count="430" meta:non-whitespace-character-count="348"/>
  </office:meta>
</office:document-meta>
</file>